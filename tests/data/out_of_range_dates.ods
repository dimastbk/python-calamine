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number="urn:oasis:names:tc:opendocument:xmlns:datastyle:1.0" office:version="1.2">
  <office:automatic-styles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data-style-name="N37"/>
  </office:automatic-styles>
  <office:body>
    <office:spreadsheet>
      <table:table table:name="past_date">
        <table:table-row>
          <table:table-cell office:value-type="date" office:date-value="0500-06-15" table:style-name="ce1">
            <text:p>0500-06-15</text:p>
          </table:table-cell>
        </table:table-row>
      </table:table>
      <table:table table:name="past_datetime">
        <table:table-row>
          <table:table-cell office:value-type="date" office:date-value="0500-06-15T10:30:00" table:style-name="ce1">
            <text:p>0500-06-15T10:30:00</text:p>
          </table:table-cell>
        </table:table-row>
      </table:table>
    </office:spreadsheet>
  </office:body>
</office:document-content>
</file>