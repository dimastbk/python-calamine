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number="urn:oasis:names:tc:opendocument:xmlns:datastyle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number="urn:oasis:names:tc:opendocument:xmlns:datastyle:1.0" xmlns:style="urn:oasis:names:tc:opendocument:xmlns:style:1.0" xmlns:table="urn:oasis:names:tc:opendocument:xmlns:table:1.0" xmlns:manifest="urn:oasis:names:tc:opendocument:xmlns:manifest:1.0" office:version="1.2">
  <office:automatic-styles>
    <number:date-style style:name="date-style" style:display-name="date-style">
      <number:year number:style="long"/>
      <number:text>-</number:text>
      <number:month number:style="long"/>
      <number:text>-</number:text>
      <number:day number:style="long"/>
    </number:date-style>
    <number:date-style style:name="datetime-style" style:display-name="datetime-style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-date" style:family="table-cell" style:data-style-name="date-style" style:display-name="ce-date"/>
    <style:style style:name="ce-datetime" style:family="table-cell" style:data-style-name="datetime-style" style:display-name="ce-datetime"/>
  </office:automatic-styles>
  <office:body>
    <office:spreadsheet>
      <table:table table:name="past_date">
        <table:table-row>
          <table:table-cell office:value-type="date" office:date-value="0500-06-15" table:style-name="ce-date"/>
        </table:table-row>
      </table:table>
      <table:table table:name="past_datetime">
        <table:table-row>
          <table:table-cell office:value-type="date" office:date-value="0500-06-15T10:30:00" table:style-name="ce-datetime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number="urn:oasis:names:tc:opendocument:xmlns:datastyle:1.0" xmlns:style="urn:oasis:names:tc:opendocument:xmlns:sty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number="urn:oasis:names:tc:opendocument:xmlns:datastyle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